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Spacing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Spacing" style:family="paragraph">
      <style:text-properties fo:font-weight="bold" style:font-weight-asian="bold" style:font-weight-complex="bold"/>
    </style:style>
    <style:style style:name="P5" style:parent-style-name="NoSpacing" style:family="paragraph">
      <style:text-properties fo:font-weight="bold" style:font-weight-asian="bold" style:font-weight-complex="bold"/>
    </style:style>
    <style:style style:name="P6" style:parent-style-name="NoSpacing" style:family="paragraph">
      <style:text-properties fo:font-weight="bold" style:font-weight-asian="bold" style:font-weight-complex="bold"/>
    </style:style>
    <style:style style:name="P7" style:parent-style-name="NoSpacing" style:family="paragraph">
      <style:text-properties fo:font-weight="bold" style:font-weight-asian="bold" style:font-weight-complex="bold"/>
    </style:style>
    <style:style style:name="P8" style:parent-style-name="NoSpacing" style:family="paragraph">
      <style:text-properties fo:font-weight="bold" style:font-weight-asian="bold" style:font-weight-complex="bold"/>
    </style:style>
    <style:style style:name="P9" style:parent-style-name="NoSpacing" style:family="paragraph">
      <style:text-properties fo:font-weight="bold" style:font-weight-asian="bold" style:font-weight-complex="bold"/>
    </style:style>
    <style:style style:name="P10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Spacing" style:family="paragraph">
      <style:text-properties fo:font-weight="bold" style:font-weight-asian="bold" style:font-weight-complex="bold"/>
    </style:style>
    <style:style style:name="P12" style:parent-style-name="NoSpacing" style:family="paragraph">
      <style:text-properties fo:font-weight="bold" style:font-weight-asian="bold" style:font-weight-complex="bold"/>
    </style:style>
    <style:style style:name="P13" style:parent-style-name="NoSpacing" style:family="paragraph">
      <style:text-properties fo:font-weight="bold" style:font-weight-asian="bold" style:font-weight-complex="bold"/>
    </style:style>
    <style:style style:name="P14" style:parent-style-name="NoSpacing" style:family="paragraph">
      <style:text-properties fo:font-weight="bold" style:font-weight-asian="bold" style:font-weight-complex="bold"/>
    </style:style>
    <style:style style:name="P15" style:parent-style-name="NoSpacing" style:family="paragraph">
      <style:text-properties fo:font-weight="bold" style:font-weight-asian="bold" style:font-weight-complex="bold"/>
    </style:style>
    <style:style style:name="P16" style:parent-style-name="NoSpacing" style:family="paragraph">
      <style:text-properties fo:font-weight="bold" style:font-weight-asian="bold" style:font-weight-complex="bold"/>
    </style:style>
    <style:style style:name="P17" style:parent-style-name="NoSpacing" style:family="paragraph">
      <style:text-properties fo:font-weight="bold" style:font-weight-asian="bold" style:font-weight-complex="bold"/>
    </style:style>
    <style:style style:name="P18" style:parent-style-name="NoSpacing" style:family="paragraph">
      <style:text-properties fo:font-weight="bold" style:font-weight-asian="bold" style:font-weight-complex="bold"/>
    </style:style>
    <style:style style:name="P19" style:parent-style-name="NoSpacing" style:family="paragraph">
      <style:text-properties fo:font-weight="bold" style:font-weight-asian="bold" style:font-weight-complex="bold"/>
    </style:style>
    <style:style style:name="P20" style:parent-style-name="NoSpacing" style:family="paragraph">
      <style:text-properties fo:font-weight="bold" style:font-weight-asian="bold" style:font-weight-complex="bold"/>
    </style:style>
    <style:style style:name="P21" style:parent-style-name="NoSpacing" style:family="paragraph">
      <style:text-properties fo:font-weight="bold" style:font-weight-asian="bold" style:font-weight-complex="bold"/>
    </style:style>
    <style:style style:name="P22" style:parent-style-name="NoSpacing" style:family="paragraph">
      <style:text-properties fo:font-weight="bold" style:font-weight-asian="bold" style:font-weight-complex="bold"/>
    </style:style>
    <style:style style:name="P23" style:parent-style-name="NoSpacing" style:family="paragraph">
      <style:text-properties fo:font-weight="bold" style:font-weight-asian="bold" style:font-weight-complex="bold"/>
    </style:style>
    <style:style style:name="P24" style:parent-style-name="NoSpacing" style:family="paragraph">
      <style:text-properties fo:font-weight="bold" style:font-weight-asian="bold" style:font-weight-complex="bold"/>
    </style:style>
    <style:style style:name="P25" style:parent-style-name="NoSpacing" style:family="paragraph">
      <style:text-properties fo:font-weight="bold" style:font-weight-asian="bold" style:font-weight-complex="bold"/>
    </style:style>
    <style:style style:name="P26" style:parent-style-name="NoSpacing" style:family="paragraph">
      <style:text-properties fo:font-weight="bold" style:font-weight-asian="bold" style:font-weight-complex="bold"/>
    </style:style>
    <style:style style:name="P27" style:parent-style-name="NoSpacing" style:family="paragraph">
      <style:text-properties fo:font-weight="bold" style:font-weight-asian="bold" style:font-weight-complex="bold"/>
    </style:style>
    <style:style style:name="P28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NoSpacing" style:family="paragraph">
      <style:text-properties fo:font-weight="bold" style:font-weight-asian="bold" style:font-weight-complex="bold"/>
    </style:style>
    <style:style style:name="P31" style:parent-style-name="NoSpacing" style:family="paragraph">
      <style:text-properties fo:font-weight="bold" style:font-weight-asian="bold" style:font-weight-complex="bold"/>
    </style:style>
    <style:style style:name="P32" style:parent-style-name="NoSpacing" style:family="paragraph">
      <style:text-properties fo:font-weight="bold" style:font-weight-asian="bold" style:font-weight-complex="bold"/>
    </style:style>
    <style:style style:name="P33" style:parent-style-name="NoSpacing" style:family="paragraph">
      <style:text-properties fo:font-weight="bold" style:font-weight-asian="bold" style:font-weight-complex="bold"/>
    </style:style>
    <style:style style:name="P34" style:parent-style-name="NoSpacing" style:family="paragraph">
      <style:text-properties fo:font-weight="bold" style:font-weight-asian="bold" style:font-weight-complex="bold"/>
    </style:style>
    <style:style style:name="P35" style:parent-style-name="NoSpacing" style:family="paragraph">
      <style:text-properties fo:font-weight="bold" style:font-weight-asian="bold" style:font-weight-complex="bold"/>
    </style:style>
    <style:style style:name="P36" style:parent-style-name="NoSpacing" style:family="paragraph">
      <style:text-properties fo:font-weight="bold" style:font-weight-asian="bold" style:font-weight-complex="bold"/>
    </style:style>
    <style:style style:name="P37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39" style:family="table-column">
      <style:table-column-properties style:column-width="3.4409in"/>
    </style:style>
    <style:style style:name="TableColumn40" style:family="table-column">
      <style:table-column-properties style:column-width="3.4409in"/>
    </style:style>
    <style:style style:name="Table38" style:family="table">
      <style:table-properties style:width="6.8819in" fo:margin-left="0in" table:align="left"/>
    </style:style>
    <style:style style:name="TableRow41" style:family="table-row">
      <style:table-row-properties style:min-row-height="0.3458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Spacing" style:family="paragraph">
      <style:text-properties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Spacing" style:family="paragraph">
      <style:text-properties fo:font-weight="bold" style:font-weight-asian="bold" style:font-weight-complex="bold"/>
    </style:style>
    <style:style style:name="TableRow46" style:family="table-row">
      <style:table-row-properties style:min-row-height="0.3458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 style:min-row-height="0.3597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3458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 style:min-row-height="0.3458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 style:min-row-height="0.3458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 style:min-row-height="0.3597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 style:min-row-height="0.3458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 style:min-row-height="0.3458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 style:min-row-height="0.3458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ACOUSTIC AND ULTRASONIC LEAK DETECTION FOR INDUSTRIAL SYSTEMS</text:p>
      <text:p text:style-name="P2"/>
      <text:p text:style-name="P3">1.Use Cases:</text:p>
      <text:p text:style-name="NoSpacing"/>
      <text:p text:style-name="P4">1.1<text:s/>Industrial Water Pipelines:<text:tab/></text:p>
      <text:p text:style-name="NoSpacing">Detects and localizes leaks in water transportation pipelines before severe damage occurs.<text:tab/></text:p>
      <text:p text:style-name="NoSpacing"/>
      <text:p text:style-name="P5">1.2<text:s/>Oil Pipelines:<text:tab/></text:p>
      <text:p text:style-name="NoSpacing">Early leak localization to prevent environmental pollution and financial losses.<text:tab/></text:p>
      <text:p text:style-name="NoSpacing"/>
      <text:p text:style-name="P6">1.3<text:s/>Natural Gas Pipelines:<text:s/></text:p>
      <text:p text:style-name="NoSpacing">Detects escaping gas through ultrasonic acoustic emissions generated by turbulent flow.</text:p>
      <text:p text:style-name="NoSpacing"/>
      <text:p text:style-name="P7">1.4<text:s/>Pressure Vessels:<text:tab/></text:p>
      <text:p text:style-name="NoSpacing">Monitors leakage from industrial storage tanks and pressure vessels.<text:tab/></text:p>
      <text:p text:style-name="NoSpacing"/>
      <text:p text:style-name="P8">1.5<text:s/>Chemical Plants:<text:tab/></text:p>
      <text:p text:style-name="NoSpacing">Detects leakage of hazardous chemicals and corrosive fluids.</text:p>
      <text:p text:style-name="NoSpacing"/>
      <text:p text:style-name="P9">1.6<text:s/>Nuclear Facilities:</text:p>
      <text:p text:style-name="NoSpacing">Remote leak monitoring in hazardous environments without physical contact.</text:p>
      <text:p text:style-name="NoSpacing"/>
      <text:p text:style-name="P10">2. Benefits of Acoustic and Ultrasonic Leak Detection:</text:p>
      <text:p text:style-name="P11"/>
      <text:p text:style-name="P12">2.1 Early Leak Detection:</text:p>
      <text:p text:style-name="P13"/>
      <text:p text:style-name="NoSpacing">Detects leaks before catastrophic failures occur.</text:p>
      <text:p text:style-name="NoSpacing">Prevents environmental contamination.</text:p>
      <text:p text:style-name="NoSpacing">Minimizes downtime.</text:p>
      <text:p text:style-name="NoSpacing"/>
      <text:p text:style-name="P14">2.2 Non-contact Inspection:</text:p>
      <text:p text:style-name="P15"/>
      <text:p text:style-name="NoSpacing">No need to physically touch the pipe.</text:p>
      <text:p text:style-name="NoSpacing">Suitable for dangerous and inaccessible environments.</text:p>
      <text:p text:style-name="NoSpacing">Improves operator safety.</text:p>
      <text:p text:style-name="NoSpacing"/>
      <text:p text:style-name="P16">2.3 Real-Time Monitoring:</text:p>
      <text:p text:style-name="P17"/>
      <text:p text:style-name="NoSpacing">Continuous monitoring of pipelines.</text:p>
      <text:p text:style-name="NoSpacing">Immediate detection of leak occurrence.</text:p>
      <text:p text:style-name="NoSpacing">Suitable for online condition monitoring.</text:p>
      <text:p text:style-name="NoSpacing"/>
      <text:p text:style-name="NoSpacing"/>
      <text:p text:style-name="NoSpacing"/>
      <text:p text:style-name="P18">2.4 High Localization Accuracy:</text:p>
      <text:p text:style-name="P19"/>
      <text:p text:style-name="NoSpacing">Uses Time Difference of Arrival (TDOA).</text:p>
      <text:p text:style-name="NoSpacing">Hybrid signal processing improves localization precision.</text:p>
      <text:p text:style-name="NoSpacing">Virtual beamforming accurately estimates gas leak position.</text:p>
      <text:p text:style-name="NoSpacing"/>
      <text:p text:style-name="NoSpacing"/>
      <text:p text:style-name="P20">2.5 High Sensitivity:</text:p>
      <text:p text:style-name="P21"/>
      <text:p text:style-name="NoSpacing">Ultrasonic frequencies (20–80 kHz) have very little environmental interference.</text:p>
      <text:p text:style-name="NoSpacing">Better discrimination between leak signals and background noise.</text:p>
      <text:p text:style-name="NoSpacing"/>
      <text:p text:style-name="P22">2.6 Cost Reduction:</text:p>
      <text:p text:style-name="P23"/>
      <text:p text:style-name="NoSpacing">Virtual ultrasonic sensor arrays reduce the number of required sensors.</text:p>
      <text:p text:style-name="NoSpacing">Lower hardware complexity.</text:p>
      <text:p text:style-name="NoSpacing">Lower installation cost.</text:p>
      <text:p text:style-name="NoSpacing"/>
      <text:p text:style-name="P24">2.7 Remote Monitoring:</text:p>
      <text:p text:style-name="P25"/>
      <text:p text:style-name="NoSpacing">Leak detection from several meters away.</text:p>
      <text:p text:style-name="NoSpacing">Useful in hazardous industrial facilities.</text:p>
      <text:p text:style-name="NoSpacing"/>
      <text:p text:style-name="P26">2.8 Works in Harsh Industrial Environments:</text:p>
      <text:p text:style-name="P27"/>
      <text:p text:style-name="NoSpacing">Applicable in noisy factories.</text:p>
      <text:p text:style-name="NoSpacing">Can operate in outdoor industrial plants.</text:p>
      <text:p text:style-name="NoSpacing"/>
      <text:p text:style-name="P28">3. Limitations</text:p>
      <text:p text:style-name="P29"/>
      <text:p text:style-name="P30">3.1 Background Noise:</text:p>
      <text:p text:style-name="NoSpacing"/>
      <text:p text:style-name="NoSpacing">Industrial machinery produces significant acoustic noise that can mask leak signals.</text:p>
      <text:p text:style-name="NoSpacing"/>
      <text:p text:style-name="P31">3.2 Signal Attenuation:</text:p>
      <text:p text:style-name="NoSpacing"/>
      <text:p text:style-name="NoSpacing">Acoustic signals lose energy while propagating through long pipelines.</text:p>
      <text:p text:style-name="NoSpacing"/>
      <text:p text:style-name="NoSpacing"/>
      <text:p text:style-name="NoSpacing"/>
      <text:p text:style-name="NoSpacing"/>
      <text:p text:style-name="NoSpacing"/>
      <text:soft-page-break/>
      <text:p text:style-name="P32">3.3 Environmental Dependency:</text:p>
      <text:p text:style-name="NoSpacing"/>
      <text:p text:style-name="NoSpacing">Leak localization accuracy is influenced by:</text:p>
      <text:p text:style-name="NoSpacing"/>
      <text:p text:style-name="NoSpacing">Temperature</text:p>
      <text:p text:style-name="NoSpacing">Pressure</text:p>
      <text:p text:style-name="NoSpacing">Gas flow rate</text:p>
      <text:p text:style-name="NoSpacing">Pipe material</text:p>
      <text:p text:style-name="NoSpacing"/>
      <text:p text:style-name="P33">3.4 Complex Signal Processing:</text:p>
      <text:p text:style-name="NoSpacing"/>
      <text:p text:style-name="NoSpacing">Methods such as</text:p>
      <text:p text:style-name="NoSpacing"/>
      <text:p text:style-name="NoSpacing">Minimum Entropy Deconvolution (MED)</text:p>
      <text:p text:style-name="NoSpacing">Beamforming</text:p>
      <text:p text:style-name="NoSpacing">Cross-power Spectrum</text:p>
      <text:p text:style-name="NoSpacing">Time Difference of Arrival (TDOA)</text:p>
      <text:p text:style-name="NoSpacing"/>
      <text:p text:style-name="NoSpacing">require considerable computational processing.</text:p>
      <text:p text:style-name="NoSpacing"/>
      <text:p text:style-name="P34">3.5 Sensor Placement:</text:p>
      <text:p text:style-name="NoSpacing"/>
      <text:p text:style-name="NoSpacing">Localization accuracy strongly depends on</text:p>
      <text:p text:style-name="NoSpacing"/>
      <text:p text:style-name="NoSpacing">Sensor spacing</text:p>
      <text:p text:style-name="NoSpacing">Number of sensors</text:p>
      <text:p text:style-name="NoSpacing">Geometry of sensor array</text:p>
      <text:p text:style-name="NoSpacing"/>
      <text:p text:style-name="P35">3.6 High Equipment Cost:</text:p>
      <text:p text:style-name="NoSpacing"/>
      <text:p text:style-name="NoSpacing">Large ultrasonic arrays require</text:p>
      <text:p text:style-name="NoSpacing"/>
      <text:p text:style-name="NoSpacing">Multiple sensors</text:p>
      <text:p text:style-name="NoSpacing">Multi-channel DAQ systems</text:p>
      <text:p text:style-name="NoSpacing">Complex synchronization</text:p>
      <text:p text:style-name="NoSpacing"/>
      <text:p text:style-name="NoSpacing">This increases installation cost.</text:p>
      <text:p text:style-name="NoSpacing"/>
      <text:p text:style-name="P36">3.7 Frequency Filtering Required</text:p>
      <text:p text:style-name="NoSpacing"/>
      <text:p text:style-name="NoSpacing">Audible frequencies (&lt;20 kHz) must be removed because they contain excessive environmental noise.</text:p>
      <text:p text:style-name="NoSpacing"/>
      <text:p text:style-name="NoSpacing"/>
      <text:soft-page-break/>
      <text:p text:style-name="P37">4. Sensor Types Used:</text:p>
      <text:p text:style-name="NoSpacing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Sensor type</text:p>
          </table:table-cell>
          <table:table-cell table:style-name="TableCell44">
            <text:p text:style-name="P45">Frequency Range</text:p>
          </table:table-cell>
        </table:table-row>
        <table:table-row table:style-name="TableRow46">
          <table:table-cell table:style-name="TableCell47">
            <text:p text:style-name="NoSpacing">Acoustic Emission (AE) Sensors</text:p>
          </table:table-cell>
          <table:table-cell table:style-name="TableCell48">
            <text:p text:style-name="NoSpacing">50–400 kHz</text:p>
          </table:table-cell>
        </table:table-row>
        <table:table-row table:style-name="TableRow49">
          <table:table-cell table:style-name="TableCell50">
            <text:p text:style-name="NoSpacing">R151-AST AE Sensor</text:p>
          </table:table-cell>
          <table:table-cell table:style-name="TableCell51">
            <text:p text:style-name="NoSpacing">50–400 kHz</text:p>
          </table:table-cell>
        </table:table-row>
        <table:table-row table:style-name="TableRow52">
          <table:table-cell table:style-name="TableCell53">
            <text:p text:style-name="NoSpacing">Ultrasonic MEMS Microphone</text:p>
          </table:table-cell>
          <table:table-cell table:style-name="TableCell54">
            <text:p text:style-name="NoSpacing">20–80 kHz</text:p>
          </table:table-cell>
        </table:table-row>
        <table:table-row table:style-name="TableRow55">
          <table:table-cell table:style-name="TableCell56">
            <text:p text:style-name="NoSpacing">Virtual Ultrasonic Sensor Array</text:p>
          </table:table-cell>
          <table:table-cell table:style-name="TableCell57">
            <text:p text:style-name="NoSpacing">Around 40 kHz</text:p>
          </table:table-cell>
        </table:table-row>
        <table:table-row table:style-name="TableRow58">
          <table:table-cell table:style-name="TableCell59">
            <text:p text:style-name="NoSpacing">Reference Ultrasonic Sensor</text:p>
          </table:table-cell>
          <table:table-cell table:style-name="TableCell60">
            <text:p text:style-name="NoSpacing">Ultrasonic</text:p>
          </table:table-cell>
        </table:table-row>
        <table:table-row table:style-name="TableRow61">
          <table:table-cell table:style-name="TableCell62">
            <text:p text:style-name="NoSpacing">Scanning Ultrasonic Senso</text:p>
          </table:table-cell>
          <table:table-cell table:style-name="TableCell63">
            <text:p text:style-name="NoSpacing">Ultrasonic</text:p>
          </table:table-cell>
        </table:table-row>
        <table:table-row table:style-name="TableRow64">
          <table:table-cell table:style-name="TableCell65">
            <text:p text:style-name="NoSpacing">Piezoelectric AE sensor</text:p>
          </table:table-cell>
          <table:table-cell table:style-name="TableCell66">
            <text:p text:style-name="NoSpacing">80–200 kHz</text:p>
          </table:table-cell>
        </table:table-row>
        <table:table-row table:style-name="TableRow67">
          <table:table-cell table:style-name="TableCell68">
            <text:p text:style-name="NoSpacing">Piezoelectric AE sensor (general)</text:p>
          </table:table-cell>
          <table:table-cell table:style-name="TableCell69">
            <text:p text:style-name="NoSpacing">80–200 kHz</text:p>
          </table:table-cell>
        </table:table-row>
        <table:table-row table:style-name="TableRow70">
          <table:table-cell table:style-name="TableCell71">
            <text:p text:style-name="NoSpacing">Digital MEMS microphone</text:p>
          </table:table-cell>
          <table:table-cell table:style-name="TableCell72">
            <text:p text:style-name="NoSpacing">80–200 kHz</text:p>
          </table:table-cell>
        </table:table-row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Calibri Light" style:font-name-asian="Times New Roman" style:font-name-complex="Times New Roman" fo:color="#2F5496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Calibri" style:font-name-asian="Times New Roman" style:font-name-complex="Times New Roman" fo:color="#2F5496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Calibri" style:font-name-asian="Times New Roman" style:font-name-complex="Times New Roman"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Calibri" style:font-name-asian="Times New Roman" style:font-name-complex="Times New Roman" fo:color="#2F5496" style:letter-kerning="true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line-height="115%"/>
      <style:text-properties style:font-name="Calibri" style:font-name-asian="Times New Roman" style:font-name-complex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line-height="115%"/>
      <style:text-properties style:font-name="Calibri" style:font-name-asian="Times New Roman" style:font-name-complex="Times New Roman" fo:color="#595959" style:letter-kerning="true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line-height="115%"/>
      <style:text-properties style:font-name="Calibri" style:font-name-asian="Times New Roman" style:font-name-complex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line-height="115%"/>
      <style:text-properties style:font-name="Calibri" style:font-name-asian="Times New Roman" style:font-name-complex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Arial" style:font-name-complex="Arial" style:letter-kerning="false" fo:font-size="11pt" style:font-size-asian="11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line-height="115%"/>
      <style:text-properties style:font-name="Calibri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 fo:line-height="115%"/>
      <style:text-properties style:font-name="Calibri" style:font-name-asian="Calibri" style:font-name-complex="Times New Roman"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bottom="0.1111in" fo:line-height="115%" fo:margin-left="0.5in">
        <style:tab-stops/>
      </style:paragraph-properties>
      <style:text-properties style:font-name="Calibri" style:font-name-asian="Calibri" style:font-name-complex="Times New Roman" style:letter-kerning="true" fo:font-size="12pt" style:font-size-asian="12pt" style:font-size-complex="12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Calibri" style:font-name-asian="Calibri" style:font-name-complex="Times New Roman"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6-06-30T11:26:00Z</meta:creation-date>
    <dc:date>2026-06-30T12:37:00Z</dc:date>
    <meta:template xlink:href="Normal" xlink:type="simple"/>
    <meta:editing-cycles>1</meta:editing-cycles>
    <meta:editing-duration>PT2040S</meta:editing-duration>
    <meta:document-statistic meta:page-count="4" meta:paragraph-count="6" meta:word-count="493" meta:character-count="3302" meta:row-count="23" meta:non-whitespace-character-count="2815"/>
  </office:meta>
</office:document-meta>
</file>